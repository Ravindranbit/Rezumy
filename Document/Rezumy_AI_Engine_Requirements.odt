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111111" loext:opacity="100%"/>
    </style:style>
    <style:style style:name="P2" style:family="paragraph" style:parent-style-name="Heading_20_2">
      <style:text-properties fo:color="#111111" loext:opacity="100%"/>
    </style:style>
    <style:style style:name="P3" style:family="paragraph" style:parent-style-name="List_20_1" style:list-style-name="WWNum1">
      <style:text-properties fo:color="#111111" loext:opacity="100%"/>
    </style:style>
    <style:style style:name="P4" style:family="paragraph" style:parent-style-name="Standard">
      <style:text-properties fo:color="#11111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zumy AI Engine — Development Requirements</text:h>
      <text:p text:style-name="P4">This document describes the AI engine requirements for Rezumy. The goal is to build an intelligent AI recruiter assistant that analyzes GitHub repositories, generates ATS-friendly resume content, and tailors resumes for job applications.</text:p>
      <text:h text:style-name="P2" text:outline-level="2">Goal</text:h>
      <text:list text:style-name="WWNum1">
        <text:list-item>
          <text:p text:style-name="P3">Analyze GitHub repositories automatically</text:p>
        </text:list-item>
        <text:list-item>
          <text:p text:style-name="P3">Identify the most relevant projects</text:p>
        </text:list-item>
        <text:list-item>
          <text:p text:style-name="P3">Generate ATS-friendly project descriptions</text:p>
        </text:list-item>
        <text:list-item>
          <text:p text:style-name="P3">Extract and prioritize technical skills</text:p>
        </text:list-item>
        <text:list-item>
          <text:p text:style-name="P3">Tailor resumes based on target job descriptions</text:p>
        </text:list-item>
      </text:list>
      <text:h text:style-name="P2" text:outline-level="2">Input Data</text:h>
      <text:list text:continue-numbering="true" text:style-name="WWNum1">
        <text:list-item>
          <text:p text:style-name="P3">GitHub username and repositories</text:p>
        </text:list-item>
        <text:list-item>
          <text:p text:style-name="P3">Existing resume</text:p>
        </text:list-item>
        <text:list-item>
          <text:p text:style-name="P3">Target job role</text:p>
        </text:list-item>
        <text:list-item>
          <text:p text:style-name="P3">Job Description (JD)</text:p>
        </text:list-item>
      </text:list>
      <text:h text:style-name="P2" text:outline-level="2">Step 1 — Repository Analysis</text:h>
      <text:list text:continue-numbering="true" text:style-name="WWNum1">
        <text:list-item>
          <text:p text:style-name="P3">Read repository metadata</text:p>
        </text:list-item>
        <text:list-item>
          <text:p text:style-name="P3">Analyze README, package.json, requirements.txt, commits, tech stack, and folder structure</text:p>
        </text:list-item>
        <text:list-item>
          <text:p text:style-name="P3">Determine project category, complexity, usefulness, technologies used, and project quality</text:p>
        </text:list-item>
      </text:list>
      <text:h text:style-name="P2" text:outline-level="2">Example Repository Output</text:h>
      <text:list text:continue-numbering="true" text:style-name="WWNum1">
        <text:list-item>
          <text:p text:style-name="P3">{ "repo": "smart-inventory-system", "domain": "Full Stack", "skills": ["React", "Node.js", "MongoDB"], "quality_score": 8.5, "relevance_score": 9.2 }</text:p>
        </text:list-item>
      </text:list>
      <text:h text:style-name="P2" text:outline-level="2">Step 2 — Relevance Filtering</text:h>
      <text:list text:continue-numbering="true" text:style-name="WWNum1">
        <text:list-item>
          <text:p text:style-name="P3">Do not include all repositories</text:p>
        </text:list-item>
        <text:list-item>
          <text:p text:style-name="P3">Rank projects based on target role, JD keywords, quality, recency, and complexity</text:p>
        </text:list-item>
        <text:list-item>
          <text:p text:style-name="P3">Keep only the top 3–5 relevant projects</text:p>
        </text:list-item>
        <text:list-item>
          <text:p text:style-name="P3">Ignore tutorial, forked, empty, or low-quality repositories</text:p>
        </text:list-item>
      </text:list>
      <text:h text:style-name="P2" text:outline-level="2">Step 3 — ATS-Friendly Project Description Generation</text:h>
      <text:list text:continue-numbering="true" text:style-name="WWNum1">
        <text:list-item>
          <text:p text:style-name="P3">Generate action-oriented and recruiter-friendly descriptions</text:p>
        </text:list-item>
        <text:list-item>
          <text:p text:style-name="P3">Highlight impact, architecture, and technologies</text:p>
        </text:list-item>
        <text:list-item>
          <text:p text:style-name="P3">Avoid generic wording</text:p>
        </text:list-item>
        <text:list-item>
          <text:p text:style-name="P3">Use ATS-friendly keywords naturally</text:p>
        </text:list-item>
      </text:list>
      <text:h text:style-name="P2" text:outline-level="2">Example</text:h>
      <text:list text:continue-numbering="true" text:style-name="WWNum1">
        <text:list-item>
          <text:p text:style-name="P3">Bad: "Built a website using React."</text:p>
        </text:list-item>
        <text:list-item>
          <text:p text:style-name="P3">Good: "Developed a responsive real-estate platform using React.js, Node.js, and MongoDB, improving property search efficiency through dynamic filtering and map integration."</text:p>
        </text:list-item>
      </text:list>
      <text:h text:style-name="P2" text:outline-level="2"><text:soft-page-break/>Step 4 — Skill Extraction</text:h>
      <text:list text:continue-numbering="true" text:style-name="WWNum1">
        <text:list-item>
          <text:p text:style-name="P3">Extract skills from repositories</text:p>
        </text:list-item>
        <text:list-item>
          <text:p text:style-name="P3">Categorize them into Frontend, Backend, AI/ML, DevOps, Databases, and Cloud</text:p>
        </text:list-item>
        <text:list-item>
          <text:p text:style-name="P3">Prioritize skills relevant to the target role and JD</text:p>
        </text:list-item>
      </text:list>
      <text:h text:style-name="P2" text:outline-level="2">Step 5 — Resume Tailoring</text:h>
      <text:list text:continue-numbering="true" text:style-name="WWNum1">
        <text:list-item>
          <text:p text:style-name="P3">Match resume keywords to the job description</text:p>
        </text:list-item>
        <text:list-item>
          <text:p text:style-name="P3">Improve ATS compatibility</text:p>
        </text:list-item>
        <text:list-item>
          <text:p text:style-name="P3">Reorder projects and skills dynamically</text:p>
        </text:list-item>
        <text:list-item>
          <text:p text:style-name="P3">Maintain natural and professional language</text:p>
        </text:list-item>
      </text:list>
      <text:h text:style-name="P2" text:outline-level="2">Step 6 — Output</text:h>
      <text:list text:continue-numbering="true" text:style-name="WWNum1">
        <text:list-item>
          <text:p text:style-name="P3">Generate optimized project descriptions</text:p>
        </text:list-item>
        <text:list-item>
          <text:p text:style-name="P3">Generate curated skills section</text:p>
        </text:list-item>
        <text:list-item>
          <text:p text:style-name="P3">Produce ATS-friendly structured resume JSON</text:p>
        </text:list-item>
      </text:list>
      <text:h text:style-name="P2" text:outline-level="2">Suggested AI Architecture</text:h>
      <text:list text:continue-numbering="true" text:style-name="WWNum1">
        <text:list-item>
          <text:p text:style-name="P3">GitHub API Fetcher</text:p>
        </text:list-item>
        <text:list-item>
          <text:p text:style-name="P3">Repository Parser</text:p>
        </text:list-item>
        <text:list-item>
          <text:p text:style-name="P3">Embedding/Vector Engine</text:p>
        </text:list-item>
        <text:list-item>
          <text:p text:style-name="P3">LLM Resume Optimizer</text:p>
        </text:list-item>
        <text:list-item>
          <text:p text:style-name="P3">ATS Scoring Module</text:p>
        </text:list-item>
      </text:list>
      <text:h text:style-name="P2" text:outline-level="2">Recommended Technologies</text:h>
      <text:list text:continue-numbering="true" text:style-name="WWNum1">
        <text:list-item>
          <text:p text:style-name="P3">GitHub API</text:p>
        </text:list-item>
        <text:list-item>
          <text:p text:style-name="P3">LangChain</text:p>
        </text:list-item>
        <text:list-item>
          <text:p text:style-name="P3">FastAPI or Node.js</text:p>
        </text:list-item>
        <text:list-item>
          <text:p text:style-name="P3">OpenAI API / Gemini / Claude</text:p>
        </text:list-item>
        <text:list-item>
          <text:p text:style-name="P3">Sentence Transformers</text:p>
        </text:list-item>
        <text:list-item>
          <text:p text:style-name="P3">RAG Pipeline</text:p>
        </text:list-item>
      </text:list>
      <text:h text:style-name="P2" text:outline-level="2">Important AI Logic</text:h>
      <text:list text:continue-numbering="true" text:style-name="WWNum1">
        <text:list-item>
          <text:p text:style-name="P3">The AI should think like: "Would a recruiter consider this project relevant for this role?"</text:p>
        </text:list-item>
        <text:list-item>
          <text:p text:style-name="P3">Not: "List every repository."</text:p>
        </text:list-item>
      </text:list>
      <text:h text:style-name="P2" text:outline-level="2">Future Features</text:h>
      <text:list text:continue-numbering="true" text:style-name="WWNum1">
        <text:list-item>
          <text:p text:style-name="P3">AI-generated portfolio</text:p>
        </text:list-item>
        <text:list-item>
          <text:p text:style-name="P3">AI cover letters</text:p>
        </text:list-item>
        <text:list-item>
          <text:p text:style-name="P3">Interview question generation</text:p>
        </text:list-item>
        <text:list-item>
          <text:p text:style-name="P3">Skill-gap analysis</text:p>
        </text:list-item>
        <text:list-item>
          <text:p text:style-name="P3">Auto-apply system</text:p>
        </text:list-item>
        <text:list-item>
          <text:p text:style-name="P3">Recruiter scoring</text:p>
        </text:list-item>
      </text:list>
      <text:p text:style-name="P4">Final Vision: Rezumy should function as an AI recruiter assistant that understands GitHub projects and transforms them into recruiter-quality resume cont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  <style:text-properties fo:font-size="11pt" style:font-size-asian="11pt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5-15T14:31:34.038696998</dc:date>
    <meta:editing-duration>PT5M8S</meta:editing-duration>
    <meta:generator>LibreOffice/24.2.7.2$Linux_X86_64 LibreOffice_project/420$Build-2</meta:generator>
    <meta:document-statistic meta:table-count="0" meta:image-count="0" meta:object-count="0" meta:page-count="2" meta:paragraph-count="69" meta:word-count="422" meta:character-count="2865" meta:non-whitespace-character-count="2558"/>
    <meta:user-defined meta:name="AppVersion">14.0000</meta:user-defined>
    <meta:template xlink:type="simple" xlink:actuate="onRequest" xlink:title="Normal.dotm" xlink:href=""/>
  </office:meta>
</office:document-meta>
</file>